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7447" calcext:value-type="float">
            <text:p>1744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7282" calcext:value-type="float">
            <text:p>27282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8525" calcext:value-type="float">
            <text:p>38525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formula="of:=192+32" office:value-type="float" office:value="224" calcext:value-type="float">
            <text:p>224</text:p>
          </table:table-cell>
          <table:table-cell office:value-type="float" office:value="64684" calcext:value-type="float">
            <text:p>64684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79381" calcext:value-type="float">
            <text:p>79381</text:p>
          </table:table-cell>
        </table:table-row>
        <table:table-row table:style-name="ro1">
          <table:table-cell/>
          <table:table-cell table:formula="of:=256+32" office:value-type="float" office:value="288" calcext:value-type="float">
            <text:p>288</text:p>
          </table:table-cell>
          <table:table-cell office:value-type="float" office:value="95134" calcext:value-type="float">
            <text:p>9513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11767" calcext:value-type="float">
            <text:p>1117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29166" calcext:value-type="float">
            <text:p>229166</text:p>
          </table:table-cell>
        </table:table-row>
        <table:table-row table:style-name="ro1">
          <table:table-cell/>
          <table:table-cell table:formula="of:=512+256" office:value-type="float" office:value="768" calcext:value-type="float">
            <text:p>768</text:p>
          </table:table-cell>
          <table:table-cell office:value-type="float" office:value="424713" calcext:value-type="float">
            <text:p>42471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657310" calcext:value-type="float">
            <text:p>6573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0:30:41.016467300</meta:creation-date>
    <dc:date>2026-01-25T10:42:00.065729400</dc:date>
    <meta:editing-duration>PT11M19S</meta:editing-duration>
    <meta:editing-cycles>1</meta:editing-cycles>
    <meta:document-statistic meta:table-count="1" meta:cell-count="36" meta:object-count="0"/>
    <meta:generator>LibreOffice/25.2.7.2$Windows_X86_64 LibreOffice_project/5cbfd1ab6520636bb5f7b99185aa69bd7456825d</meta:generator>
  </office:meta>
</office:document-meta>
</file>