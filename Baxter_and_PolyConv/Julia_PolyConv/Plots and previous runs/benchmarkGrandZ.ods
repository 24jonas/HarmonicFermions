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3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row table:style-name="ro1" table:number-rows-repeated="4">
          <table:table-cell table:number-columns-repeated="3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T (s) per thread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table:formula="of:=0.718378*0.61" office:value-type="float" office:value="0.43821058" calcext:value-type="float">
            <text:p>0.43821058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table:formula="of:=1.00892*0.71" office:value-type="float" office:value="0.7163332" calcext:value-type="float">
            <text:p>0.7163332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formula="of:=1.317373*0.76" office:value-type="float" office:value="1.00120348" calcext:value-type="float">
            <text:p>1.00120348</text:p>
          </table:table-cell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table:formula="of:=1.784012*0.84" office:value-type="float" office:value="1.49857008" calcext:value-type="float">
            <text:p>1.49857008</text:p>
          </table:table-cell>
        </table:table-row>
        <table:table-row table:style-name="ro1">
          <table:table-cell/>
          <table:table-cell office:value-type="float" office:value="160" calcext:value-type="float">
            <text:p>160</text:p>
          </table:table-cell>
          <table:table-cell table:formula="of:=2.401219*0.89" office:value-type="float" office:value="2.13708491" calcext:value-type="float">
            <text:p>2.13708491</text:p>
          </table:table-cell>
        </table:table-row>
        <table:table-row table:style-name="ro1">
          <table:table-cell/>
          <table:table-cell office:value-type="float" office:value="192" calcext:value-type="float">
            <text:p>192</text:p>
          </table:table-cell>
          <table:table-cell table:formula="of:=2.934563*0.81" office:value-type="float" office:value="2.37699603" calcext:value-type="float">
            <text:p>2.37699603</text:p>
          </table:table-cell>
        </table:table-row>
        <table:table-row table:style-name="ro1">
          <table:table-cell/>
          <table:table-cell office:value-type="float" office:value="224" calcext:value-type="float">
            <text:p>224</text:p>
          </table:table-cell>
          <table:table-cell table:formula="of:=3.208405*0.83" office:value-type="float" office:value="2.66297615" calcext:value-type="float">
            <text:p>2.66297615</text:p>
          </table:table-cell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table:formula="of:=3.963586*0.84" office:value-type="float" office:value="3.32941224" calcext:value-type="float">
            <text:p>3.32941224</text:p>
          </table:table-cell>
        </table:table-row>
        <table:table-row table:style-name="ro1">
          <table:table-cell/>
          <table:table-cell office:value-type="float" office:value="288" calcext:value-type="float">
            <text:p>288</text:p>
          </table:table-cell>
          <table:table-cell table:formula="of:=4.691611*0.84" office:value-type="float" office:value="3.94095324" calcext:value-type="float">
            <text:p>3.94095324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table:formula="of:=4.953354*0.84" office:value-type="float" office:value="4.16081736" calcext:value-type="float">
            <text:p>4.16081736</text:p>
          </table:table-cell>
        </table:table-row>
        <table:table-row table:style-name="ro1">
          <table:table-cell/>
          <table:table-cell office:value-type="float" office:value="320" calcext:value-type="float">
            <text:p>320</text:p>
          </table:table-cell>
          <table:table-cell table:formula="of:=5.485097*0.84" office:value-type="float" office:value="4.60748148" calcext:value-type="float">
            <text:p>4.60748148</text:p>
          </table:table-cell>
        </table:table-row>
        <table:table-row table:style-name="ro1">
          <table:table-cell/>
          <table:table-cell office:value-type="float" office:value="512" calcext:value-type="float">
            <text:p>512</text:p>
          </table:table-cell>
          <table:table-cell table:formula="of:=11.996944*0.86" office:value-type="float" office:value="10.31737184" calcext:value-type="float">
            <text:p>10.31737184</text:p>
          </table:table-cell>
        </table:table-row>
        <table:table-row table:style-name="ro1">
          <table:table-cell/>
          <table:table-cell office:value-type="float" office:value="1024" calcext:value-type="float">
            <text:p>1024</text:p>
          </table:table-cell>
          <table:table-cell table:formula="of:=40.523743*0.86" office:value-type="float" office:value="34.85041898" calcext:value-type="float">
            <text:p>34.8504189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2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24T13:27:20.559853500</meta:creation-date>
    <dc:date>2026-03-24T14:08:25.836724700</dc:date>
    <meta:editing-duration>PT16M8S</meta:editing-duration>
    <meta:editing-cycles>3</meta:editing-cycles>
    <meta:generator>LibreOffice/25.8.5.2$Windows_X86_64 LibreOffice_project/9c8b85f387cc00a89945a79c9e6239f32e450ac2</meta:generator>
    <meta:document-statistic meta:table-count="1" meta:cell-count="28" meta:object-count="0"/>
  </office:meta>
</office:document-meta>
</file>