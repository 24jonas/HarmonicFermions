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500" calcext:value-type="float">
            <text:p>1150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850" calcext:value-type="float">
            <text:p>1185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2050" calcext:value-type="float">
            <text:p>1205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2200" calcext:value-type="float">
            <text:p>12200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0T14:33:04.272508800</meta:creation-date>
    <dc:date>2026-03-20T14:55:29.579281600</dc:date>
    <meta:editing-duration>PT8M58S</meta:editing-duration>
    <meta:editing-cycles>2</meta:editing-cycles>
    <meta:generator>LibreOffice/25.8.5.2$Windows_X86_64 LibreOffice_project/9c8b85f387cc00a89945a79c9e6239f32e450ac2</meta:generator>
    <meta:document-statistic meta:table-count="1" meta:cell-count="23" meta:object-count="0"/>
  </office:meta>
</office:document-meta>
</file>