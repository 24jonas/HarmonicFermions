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float" office:value="1368" calcext:value-type="float">
            <text:p>136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_2</text:p>
          </table:table-cell>
          <table:table-cell office:value-type="string" calcext:value-type="string">
            <text:p>N_4</text:p>
          </table:table-cell>
          <table:table-cell office:value-type="string" calcext:value-type="string">
            <text:p>N_8</text:p>
          </table:table-cell>
          <table:table-cell office:value-type="string" calcext:value-type="string">
            <text:p>N_16</text:p>
          </table:table-cell>
          <table:table-cell office:value-type="string" calcext:value-type="string">
            <text:p>N_32</text:p>
          </table:table-cell>
          <table:table-cell office:value-type="string" calcext:value-type="string">
            <text:p>N_64</text:p>
          </table:table-cell>
          <table:table-cell office:value-type="string" calcext:value-type="string">
            <text:p>N_96</text:p>
          </table:table-cell>
          <table:table-cell office:value-type="string" calcext:value-type="string">
            <text:p>N_128</text:p>
          </table:table-cell>
          <table:table-cell office:value-type="string" calcext:value-type="string">
            <text:p>N_160</text:p>
          </table:table-cell>
          <table:table-cell office:value-type="string" calcext:value-type="string">
            <text:p>N_192</text:p>
          </table:table-cell>
        </table:table-row>
        <table:table-row table:style-name="ro1">
          <table:table-cell table:number-columns-repeated="2"/>
          <table:table-cell office:value-type="float" office:value="347.080955187265" calcext:value-type="float">
            <text:p>347.080955187265</text:p>
          </table:table-cell>
          <table:table-cell office:value-type="float" office:value="635.503709494179" calcext:value-type="float">
            <text:p>635.503709494179</text:p>
          </table:table-cell>
          <table:table-cell office:value-type="float" office:value="990.252681236006" calcext:value-type="float">
            <text:p>990.252681236006</text:p>
          </table:table-cell>
          <table:table-cell office:value-type="float" office:value="1234.93480823144" calcext:value-type="float">
            <text:p>1234.93480823144</text:p>
          </table:table-cell>
          <table:table-cell office:value-type="float" office:value="1330.74311381861" calcext:value-type="float">
            <text:p>1330.74311381861</text:p>
          </table:table-cell>
          <table:table-cell office:value-type="float" office:value="1358.39313022388" calcext:value-type="float">
            <text:p>1358.39313022388</text:p>
          </table:table-cell>
          <table:table-cell office:value-type="float" office:value="1363.7051926001" calcext:value-type="float">
            <text:p>1363.7051926001</text:p>
          </table:table-cell>
          <table:table-cell office:value-type="float" office:value="1365.57919030826" calcext:value-type="float">
            <text:p>1365.57919030826</text:p>
          </table:table-cell>
          <table:table-cell office:value-type="float" office:value="1366.44920302837" calcext:value-type="float">
            <text:p>1366.44920302837</text:p>
          </table:table-cell>
          <table:table-cell office:value-type="float" office:value="1366.9225000578" calcext:value-type="float">
            <text:p>1366.9225000578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alue at 15.2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Relativ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47.080955187265" calcext:value-type="float">
            <text:p>347.080955187265</text:p>
          </table:table-cell>
          <table:table-cell table:formula="of:=[.$B$1]-[.C9]" office:value-type="float" office:value="1020.91904481274" calcext:value-type="float">
            <text:p>1020.91904481274</text:p>
          </table:table-cell>
          <table:table-cell table:formula="of:=[.D9]/[.$B$1]" office:value-type="float" office:value="0.746285851471298" calcext:value-type="float">
            <text:p>0.7462858514712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35.503709494179" calcext:value-type="float">
            <text:p>635.503709494179</text:p>
          </table:table-cell>
          <table:table-cell table:formula="of:=[.$B$1]-[.C10]" office:value-type="float" office:value="732.496290505821" calcext:value-type="float">
            <text:p>732.496290505821</text:p>
          </table:table-cell>
          <table:table-cell table:formula="of:=[.D10]/[.$B$1]" office:value-type="float" office:value="0.535450504755717" calcext:value-type="float">
            <text:p>0.5354505047557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90.252681236006" calcext:value-type="float">
            <text:p>990.252681236006</text:p>
          </table:table-cell>
          <table:table-cell table:formula="of:=[.$B$1]-[.C11]" office:value-type="float" office:value="377.747318763994" calcext:value-type="float">
            <text:p>377.747318763994</text:p>
          </table:table-cell>
          <table:table-cell table:formula="of:=[.D11]/[.$B$1]" office:value-type="float" office:value="0.276131080967832" calcext:value-type="float">
            <text:p>0.2761310809678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34.93480823144" calcext:value-type="float">
            <text:p>1234.93480823144</text:p>
          </table:table-cell>
          <table:table-cell table:formula="of:=[.$B$1]-[.C12]" office:value-type="float" office:value="133.065191768556" calcext:value-type="float">
            <text:p>133.065191768556</text:p>
          </table:table-cell>
          <table:table-cell table:formula="of:=[.D12]/[.$B$1]" office:value-type="float" office:value="0.097269877023798" calcext:value-type="float">
            <text:p>0.0972698770237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30.74311381861" calcext:value-type="float">
            <text:p>1330.74311381861</text:p>
          </table:table-cell>
          <table:table-cell table:formula="of:=[.$B$1]-[.C13]" office:value-type="float" office:value="37.2568861813945" calcext:value-type="float">
            <text:p>37.2568861813945</text:p>
          </table:table-cell>
          <table:table-cell table:formula="of:=[.D13]/[.$B$1]" office:value-type="float" office:value="0.027234565922072" calcext:value-type="float">
            <text:p>0.0272345659220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358.39313022388" calcext:value-type="float">
            <text:p>1358.39313022388</text:p>
          </table:table-cell>
          <table:table-cell table:formula="of:=[.$B$1]-[.C14]" office:value-type="float" office:value="9.60686977612113" calcext:value-type="float">
            <text:p>9.60686977612113</text:p>
          </table:table-cell>
          <table:table-cell table:formula="of:=[.D14]/[.$B$1]" office:value-type="float" office:value="0.00702256562581954" calcext:value-type="float">
            <text:p>0.007022565625819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363.7051926001" calcext:value-type="float">
            <text:p>1363.7051926001</text:p>
          </table:table-cell>
          <table:table-cell table:formula="of:=[.$B$1]-[.C15]" office:value-type="float" office:value="4.29480739990299" calcext:value-type="float">
            <text:p>4.29480739990299</text:p>
          </table:table-cell>
          <table:table-cell table:formula="of:=[.D15]/[.$B$1]" office:value-type="float" office:value="0.00313947909349634" calcext:value-type="float">
            <text:p>0.003139479093496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365.57919030826" calcext:value-type="float">
            <text:p>1365.57919030826</text:p>
          </table:table-cell>
          <table:table-cell table:formula="of:=[.$B$1]-[.C16]" office:value-type="float" office:value="2.42080969173821" calcext:value-type="float">
            <text:p>2.42080969173821</text:p>
          </table:table-cell>
          <table:table-cell table:formula="of:=[.D16]/[.$B$1]" office:value-type="float" office:value="0.00176959772787881" calcext:value-type="float">
            <text:p>0.001769597727878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66.44920302837" calcext:value-type="float">
            <text:p>1366.44920302837</text:p>
          </table:table-cell>
          <table:table-cell table:formula="of:=[.$B$1]-[.C17]" office:value-type="float" office:value="1.55079697163046" calcext:value-type="float">
            <text:p>1.55079697163046</text:p>
          </table:table-cell>
          <table:table-cell table:formula="of:=[.D17]/[.$B$1]" office:value-type="float" office:value="0.00113362351727373" calcext:value-type="float">
            <text:p>0.001133623517273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366.9225000578" calcext:value-type="float">
            <text:p>1366.9225000578</text:p>
          </table:table-cell>
          <table:table-cell table:formula="of:=[.$B$1]-[.C18]" office:value-type="float" office:value="1.07749994219535" calcext:value-type="float">
            <text:p>1.07749994219535</text:p>
          </table:table-cell>
          <table:table-cell table:formula="of:=[.D18]/[.$B$1]" office:value-type="float" office:value="0.000787646156575545" calcext:value-type="float">
            <text:p>0.00078764615657554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21:42:55.267111000</meta:creation-date>
    <dc:date>2026-01-19T21:54:37.983074100</dc:date>
    <meta:editing-duration>PT11M41S</meta:editing-duration>
    <meta:editing-cycles>5</meta:editing-cycles>
    <meta:generator>LibreOffice/25.2.7.2$Windows_X86_64 LibreOffice_project/5cbfd1ab6520636bb5f7b99185aa69bd7456825d</meta:generator>
    <meta:document-statistic meta:table-count="1" meta:cell-count="64" meta:object-count="0"/>
  </office:meta>
</office:document-meta>
</file>